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C60000035CA7AC481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47164"/>
    </style:style>
    <style:style style:name="P2" style:family="paragraph" style:parent-style-name="Text_20_body">
      <style:text-properties officeooo:paragraph-rsid="00147164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47164"/>
    </style:style>
    <style:style style:name="P4" style:family="paragraph" style:parent-style-name="Text_20_body">
      <style:text-properties officeooo:rsid="000ffb9f" officeooo:paragraph-rsid="000ffb9f"/>
    </style:style>
    <style:style style:name="P5" style:family="paragraph" style:parent-style-name="Standard">
      <style:text-properties officeooo:rsid="000d3b64" officeooo:paragraph-rsid="000d3b64"/>
    </style:style>
    <style:style style:name="P6" style:family="paragraph" style:parent-style-name="Standard">
      <style:text-properties style:text-underline-style="none" officeooo:rsid="000d3b64" officeooo:paragraph-rsid="000d3b64"/>
    </style:style>
    <style:style style:name="P7" style:family="paragraph" style:parent-style-name="Standard">
      <style:text-properties officeooo:rsid="000f05e5" officeooo:paragraph-rsid="000f05e5"/>
    </style:style>
    <style:style style:name="P8" style:family="paragraph" style:parent-style-name="Standard">
      <style:text-properties officeooo:rsid="00103a4e" officeooo:paragraph-rsid="00103a4e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Heading_20_2">
      <style:text-properties officeooo:rsid="00147164" officeooo:paragraph-rsid="00147164"/>
    </style:style>
    <style:style style:name="P11" style:family="paragraph" style:parent-style-name="Heading_20_3">
      <style:text-properties officeooo:rsid="000ffb9f" officeooo:paragraph-rsid="000ffb9f"/>
    </style:style>
    <style:style style:name="P12" style:family="paragraph" style:parent-style-name="Heading_20_4">
      <style:text-properties officeooo:rsid="000ffb9f" officeooo:paragraph-rsid="000ffb9f"/>
    </style:style>
    <style:style style:name="P13" style:family="paragraph" style:parent-style-name="Standard">
      <loext:graphic-properties draw:fill="solid" draw:fill-color="#191a1c"/>
      <style:paragraph-properties fo:background-color="#191a1c" fo:padding="0cm" fo:border="none" style:shadow="none"/>
    </style:style>
    <style:style style:name="P14" style:family="paragraph" style:parent-style-name="Standard">
      <style:text-properties officeooo:rsid="00173955" officeooo:paragraph-rsid="00173955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 style:list-style-name="L4"/>
    <style:style style:name="P22" style:family="paragraph" style:parent-style-name="Text_20_body" style:list-style-name="L4">
      <style:paragraph-properties fo:margin-top="0cm" fo:margin-bottom="0cm" style:contextual-spacing="false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paragraph-properties fo:margin-top="0cm" fo:margin-bottom="0cm" style:contextual-spacing="false"/>
    </style:style>
    <style:style style:name="P25" style:family="paragraph" style:parent-style-name="Text_20_body" style:list-style-name="L6"/>
    <style:style style:name="P26" style:family="paragraph" style:parent-style-name="Text_20_body" style:list-style-name="L6">
      <style:paragraph-properties fo:margin-top="0cm" fo:margin-bottom="0cm" style:contextual-spacing="false"/>
    </style:style>
    <style:style style:name="P27" style:family="paragraph" style:parent-style-name="Text_20_body" style:list-style-name="L7">
      <style:paragraph-properties fo:margin-top="0cm" fo:margin-bottom="0cm" style:contextual-spacing="false"/>
      <style:text-properties officeooo:paragraph-rsid="00147164"/>
    </style:style>
    <style:style style:name="P28" style:family="paragraph" style:parent-style-name="Text_20_body">
      <style:text-properties officeooo:paragraph-rsid="00147164"/>
    </style:style>
    <style:style style:name="P29" style:family="paragraph" style:parent-style-name="Text_20_body">
      <style:text-properties officeooo:rsid="00173955" officeooo:paragraph-rsid="00173955"/>
    </style:style>
    <style:style style:name="T1" style:family="text">
      <style:text-properties style:text-underline-style="solid" style:text-underline-width="auto" style:text-underline-color="font-color" officeooo:rsid="000f05e5"/>
    </style:style>
    <style:style style:name="T2" style:family="text">
      <style:text-properties officeooo:rsid="000f05e5"/>
    </style:style>
    <style:style style:name="T3" style:family="text">
      <style:text-properties officeooo:rsid="000ffb9f"/>
    </style:style>
    <style:style style:name="T4" style:family="text">
      <style:text-properties officeooo:rsid="00103a4e"/>
    </style:style>
    <style:style style:name="T5" style:family="text">
      <style:text-properties officeooo:rsid="00128ce4"/>
    </style:style>
    <style:style style:name="T6" style:family="text">
      <style:text-properties officeooo:rsid="00147164"/>
    </style:style>
    <style:style style:name="T7" style:family="text">
      <style:text-properties fo:color="#66c3cc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dbdbd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9a26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5c46c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ed94c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c95eb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dad #4 – Planteamiento</text:p>
      <text:p text:style-name="P5"/>
      <text:p text:style-name="P5">Tengo una librería, en la cual gestiono usuarios, libros y el prestamo de libros.</text:p>
      <text:p text:style-name="P5"/>
      <text:h text:style-name="Heading_20_2" text:outline-level="2">LÓGICA DE NEGOCIO</text:h>
      <text:p text:style-name="P5">1. Un usuario debe estar registrado para poder prestar un libro</text:p>
      <text:p text:style-name="P5">2. Un usuario no puede tener más de un libro prestado</text:p>
      <text:p text:style-name="P5">3. El usuario tiene un plazo máximo de 30 días para devolver el libro</text:p>
      <text:p text:style-name="P7">4. Si el usuario no ha devuelto el libro en los 30 días debe ser visualizado y notificado</text:p>
      <text:p text:style-name="P7">5. El usuario puede pedir otro plazo de 30 días yendo a renovar la licencia</text:p>
      <text:p text:style-name="P7">5. Pueden existir varios libros iguales, deben compartir ISBN</text:p>
      <text:p text:style-name="P5"/>
      <text:h text:style-name="Heading_20_2" text:outline-level="2">REQUISITOS TÉCNICOS</text:h>
      <text:p text:style-name="P7"><text:span text:style-name="T4">1</text:span>. Filtros según genero <text:span text:style-name="T4">o estado de libros</text:span></text:p>
      <text:p text:style-name="P8">2. Filtros según estado de prestamos</text:p>
      <text:p text:style-name="P7"/>
      <text:h text:style-name="Heading_20_3" text:outline-level="3">EXTRA</text:h>
      <text:p text:style-name="P7">- Permitir que un usuario pueda registrarse y solicitar los libros</text:p>
      <text:p text:style-name="P7">- Enviar email notificando al usuario que debe entregar los libros</text:p>
      <text:p text:style-name="P5"/>
      <text:h text:style-name="Heading_20_2" text:outline-level="2">VISTAS NECESARIAS</text:h>
      <text:p text:style-name="P5">1. Landing Page</text:p>
      <text:p text:style-name="P5">2. Login</text:p>
      <text:p text:style-name="P5">3. Users CRUD</text:p>
      <text:p text:style-name="P5">4. Books CRUD</text:p>
      <text:p text:style-name="P5">5. <text:span text:style-name="T6">Loans</text:span> CRUD</text:p>
      <text:p text:style-name="P5"/>
      <text:h text:style-name="Heading_20_2" text:outline-level="2">Entidades Necesarias</text:h>
      <text:h text:style-name="Heading_20_3" text:outline-level="3">User<text:span text:style-name="T3">s</text:span></text:h>
      <text:p text:style-name="P5">- ID</text:p>
      <text:p text:style-name="P5">- Name</text:p>
      <text:p text:style-name="P5">- Last Name</text:p>
      <text:p text:style-name="P5">- Email</text:p>
      <text:p text:style-name="P5">- Phone</text:p>
      <text:p text:style-name="P5">- Address</text:p>
      <text:p text:style-name="P5">- Emergency Phone</text:p>
      <text:p text:style-name="P5">- <text:span text:style-name="T2">Blocked (true/false)</text:span></text:p>
      <text:p text:style-name="P5"/>
      <text:h text:style-name="Heading_20_3" text:outline-level="3"><text:soft-page-break/></text:h>
      <text:h text:style-name="Heading_20_3" text:outline-level="3">Book<text:span text:style-name="T3">s</text:span></text:h>
      <text:p text:style-name="P5">- ID</text:p>
      <text:p text:style-name="P5">- <text:span text:style-name="T2">ISBN (Codigo de libro unico)</text:span></text:p>
      <text:p text:style-name="P5">- Title</text:p>
      <text:p text:style-name="P5">- Description</text:p>
      <text:p text:style-name="P5">- N-Pages</text:p>
      <text:p text:style-name="P5">- Author</text:p>
      <text:p text:style-name="P5">- Editorial</text:p>
      <text:p text:style-name="P5">- Gender <text:span text:style-name="T2">(fiction, poetry, romance, childish, scientist)</text:span></text:p>
      <text:p text:style-name="P6">- Year publication</text:p>
      <text:p text:style-name="P6">- <text:span text:style-name="T5">State</text:span><text:span text:style-name="T2"> (loaned, available, </text:span><text:span text:style-name="T1">illconditioned</text:span><text:span text:style-name="T2">)</text:span></text:p>
      <text:h text:style-name="P11" text:outline-level="3">L<text:span text:style-name="T6">o</text:span>ans</text:h>
      <text:p text:style-name="P6">- <text:span text:style-name="T2">ID</text:span></text:p>
      <text:p text:style-name="P6">- <text:span text:style-name="T2">Fecha de préstamo </text:span><text:span text:style-name="T5">(LoanDate)</text:span></text:p>
      <text:p text:style-name="P6">- <text:span text:style-name="T5">Fecha de devolución requerida (ReturnedDate)</text:span></text:p>
      <text:p text:style-name="P6">- <text:span text:style-name="T3">Fecha de devolución </text:span><text:span text:style-name="T5">(ReturnDate)</text:span></text:p>
      <text:p text:style-name="P6">- <text:span text:style-name="T2">Estado (loaned, returned, postponed)</text:span></text:p>
      <text:p text:style-name="P6">- <text:span text:style-name="T2">User ID</text:span></text:p>
      <text:p text:style-name="P6">- <text:span text:style-name="T2">Book ID</text:span></text:p>
      <text:p text:style-name="P6"/>
      <text:h text:style-name="Heading_20_2" text:outline-level="2">DESARROLLO TÉCNICO</text:h>
      <text:h text:style-name="P11" text:outline-level="3">Arquitectura</text:h>
      <text:p text:style-name="P4">En capas:</text:p>
      <text:p text:style-name="P4">Vista → Controlador → Servicio → Modelo</text:p>
      <text:h text:style-name="P12" text:outline-level="4">Necesarias</text:h>
      <text:p text:style-name="P4">MODELO</text:p>
      <text:p text:style-name="P4">- UserModel</text:p>
      <text:p text:style-name="P4">- BookModel</text:p>
      <text:p text:style-name="P4">- LoanModel</text:p>
      <text:p text:style-name="P4">SERVICIOS</text:p>
      <text:p text:style-name="P4">- UserService</text:p>
      <text:p text:style-name="P4">- BookService</text:p>
      <text:p text:style-name="P4">- LoanService</text:p>
      <text:p text:style-name="P4">- AuthService</text:p>
      <text:p text:style-name="P4">CONTROLADORES</text:p>
      <text:p text:style-name="P4">- Según vistas</text:p>
      <text:p text:style-name="P4"><text:soft-page-break/></text:p>
      <text:p text:style-name="P4">VISTAS</text:p>
      <text:p text:style-name="P4">- Landing</text:p>
      <text:p text:style-name="P4">- Auth</text:p>
      <text:p text:style-name="P4">- Dashboard (estadísticas, información general)</text:p>
      <text:p text:style-name="P4">- User CRUD</text:p>
      <text:p text:style-name="P4">- Loans CRUD</text:p>
      <text:p text:style-name="P4">- Books CRUD</text:p>
      <text:p text:style-name="P4"/>
      <text:h text:style-name="P10" text:outline-level="2">BRANDING</text:h>
      <text:h text:style-name="P1" text:outline-level="1">📚 Nombre de la marca</text:h>
      <text:p text:style-name="Text_20_body"><text:span text:style-name="Strong_20_Emphasis">NexoLibro</text:span></text:p>
      <text:p text:style-name="Text_20_body">👉 Idea: el libro como punto de conexión entre personas, conocimiento y tiempo.</text:p>
      <text:h text:style-name="Heading_20_1" text:outline-level="1">🧠 Concepto de marca</text:h>
      <text:p text:style-name="Quotations">“Conectamos lectores con historias, sin fricción.”</text:p>
      <text:p text:style-name="Text_20_body">No es solo prestar libros, es:</text:p>
      <text:list text:style-name="L1">
        <text:list-item>
          <text:p text:style-name="P16">acceso fácil </text:p>
        </text:list-item>
        <text:list-item>
          <text:p text:style-name="P16">organización </text:p>
        </text:list-item>
        <text:list-item>
          <text:p text:style-name="P15">experiencia limpia </text:p>
        </text:list-item>
      </text:list>
      <text:p text:style-name="Horizontal_20_Line"/>
      <text:h text:style-name="Heading_20_1" text:outline-level="1">🎯 Propuesta de valor</text:h>
      <text:list text:style-name="L2">
        <text:list-item>
          <text:p text:style-name="P18">Préstamos simples y rápidos </text:p>
        </text:list-item>
        <text:list-item>
          <text:p text:style-name="P18">Control claro de tiempos </text:p>
        </text:list-item>
        <text:list-item>
          <text:p text:style-name="P17">Experiencia moderna (no la típica biblioteca vieja) </text:p>
        </text:list-item>
      </text:list>
      <text:p text:style-name="Horizontal_20_Line"/>
      <text:h text:style-name="Heading_20_1" text:outline-level="1">🎨 Identidad visual</text:h>
      <text:h text:style-name="Heading_20_2" text:outline-level="2">Logo (concepto)</text:h>
      <text:p text:style-name="P9"/>
      <text:p text:style-name="P9"><text:soft-page-break/></text:p>
      <text:p text:style-name="P3"><draw:frame draw:style-name="fr1" draw:name="Imagen3" text:anchor-type="as-char" svg:width="16.099cm" svg:height="7.985cm" draw:z-index="0"><draw:image xlink:href="Pictures/10000000000006C60000035CA7AC4810.jpg" xlink:type="simple" xlink:show="embed" xlink:actuate="onLoad" draw:mime-type="image/jpeg"/><svg:title>https://images.openai.com/static-rsc-4/AFz9iaIybUkLypNZ0GdlTVk6hHlgMkjxYLGI5rCmijQr-ptZPzZw1adRACjRc1BxfqazLlnokxVfwKHYq4p07XEBRCqysxsSmL2WwK7T_vr0oJHixLDiOdCsZrOXNQf8lINKYZzpCiVOJKGX3Casf_FsbOLZwPL_UlCvDAbiYo4c_moPWqE-BuVNMwua9GMk?purpose=fullsize</svg:title></draw:frame></text:p>
      <text:p text:style-name="P2">👉 Idea del logo:</text:p>
      <text:list text:style-name="L3">
        <text:list-item>
          <text:p text:style-name="P20">Libro abierto </text:p>
        </text:list-item>
        <text:list-item>
          <text:p text:style-name="P20">Líneas que conectan (tipo red / sistema) </text:p>
        </text:list-item>
        <text:list-item>
          <text:p text:style-name="P19">Estilo minimalista (importante para apps) </text:p>
        </text:list-item>
      </text:list>
      <text:h text:style-name="Heading_20_2" text:outline-level="2">🎨 Colores</text:h>
      <text:list text:style-name="L4">
        <text:list-item>
          <text:p text:style-name="P22"><text:span text:style-name="Strong_20_Emphasis">Azul oscuro (#1E3A5F)</text:span> → confianza / conocimiento </text:p>
        </text:list-item>
        <text:list-item>
          <text:p text:style-name="P22"><text:span text:style-name="Strong_20_Emphasis">Beige claro (#F4F1EA)</text:span> → calidez / lectura </text:p>
        </text:list-item>
        <text:list-item>
          <text:p text:style-name="P21"><text:span text:style-name="Strong_20_Emphasis">Verde suave (#6BAA75)</text:span> → crecimiento </text:p>
        </text:list-item>
      </text:list>
      <text:p text:style-name="Text_20_body">👉 Balance: moderno + humano</text:p>
      <text:h text:style-name="Heading_20_2" text:outline-level="2">🔤 Tipografía</text:h>
      <text:list text:style-name="L5">
        <text:list-item>
          <text:p text:style-name="P24">Títulos: sans-serif moderna (ej: Inter, Poppins) </text:p>
        </text:list-item>
        <text:list-item>
          <text:p text:style-name="P23">Texto: limpia y legible </text:p>
        </text:list-item>
      </text:list>
      <text:p text:style-name="Text_20_body">👉 Nada recargado, piensa en UI.</text:p>
      <text:h text:style-name="Heading_20_1" text:outline-level="1">🧩 Identidad verbal</text:h>
      <text:h text:style-name="Heading_20_2" text:outline-level="2">🗣️ Tono de comunicación</text:h>
      <text:list text:style-name="L6">
        <text:list-item>
          <text:p text:style-name="P26">Claro </text:p>
        </text:list-item>
        <text:list-item>
          <text:p text:style-name="P26">Cercano </text:p>
        </text:list-item>
        <text:list-item>
          <text:p text:style-name="P25">Sin formalismo excesivo </text:p>
        </text:list-item>
      </text:list>
      <text:p text:style-name="Horizontal_20_Line"/>
      <text:h text:style-name="Heading_20_2" text:outline-level="2"><text:soft-page-break/>🧾 Slogan</text:h>
      <text:list text:style-name="L7">
        <text:list-item>
          <text:p text:style-name="P27">“Leer sin límites” </text:p>
        </text:list-item>
      </text:list>
      <text:p text:style-name="P2"/>
      <text:p text:style-name="P2"/>
      <text:p text:style-name="P29">DOCS</text:p>
      <text:p text:style-name="P13" loext:marker-style-name="T8"><text:span text:style-name="T7">"Smtp"</text:span><text:span text:style-name="T8">: {<text:line-break/> <text:s/></text:span><text:span text:style-name="T7">"Host"</text:span><text:span text:style-name="T8">: </text:span><text:span text:style-name="T9">"smtp.gmail.com"</text:span><text:span text:style-name="T8">, </text:span><text:span text:style-name="T10">// Provider SMTP Server<text:line-break/> <text:s/></text:span><text:span text:style-name="T7">"Port"</text:span><text:span text:style-name="T8">: </text:span><text:span text:style-name="T11">587</text:span><text:span text:style-name="T8">, </text:span><text:span text:style-name="T10">// Conection PORT. Being 587 standart with TLS<text:line-break/> <text:s/></text:span><text:span text:style-name="T7">"User"</text:span><text:span text:style-name="T8">: </text:span><text:span text:style-name="T9">"jerogallego099@gmail.com"</text:span><text:span text:style-name="T8">, </text:span><text:span text:style-name="T10">// Your account<text:line-break/> <text:s/></text:span><text:span text:style-name="T7">"Pass"</text:span><text:span text:style-name="T8">: </text:span><text:span text:style-name="T9">""</text:span><text:span text:style-name="T8">, </text:span><text:span text:style-name="T10">// App password<text:line-break/> <text:s/></text:span><text:span text:style-name="T7">"EnableSsl"</text:span><text:span text:style-name="T8">: </text:span><text:span text:style-name="T12">true </text:span><text:span text:style-name="T10">// Cifrated<text:line-break/></text:span><text:span text:style-name="T8">},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7:18:02.303038654</meta:creation-date>
    <dc:date>2026-04-23T21:31:51.444075437</dc:date>
    <meta:editing-duration>PT5H54M14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5" meta:paragraph-count="112" meta:word-count="487" meta:character-count="2832" meta:non-whitespace-character-count="2445"/>
  </office:meta>
</office:document-meta>
</file>