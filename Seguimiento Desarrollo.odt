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rsid="000d5d42" officeooo:paragraph-rsid="000d5d42"/>
    </style:style>
    <style:style style:name="P2" style:family="paragraph" style:parent-style-name="Heading_20_3">
      <style:text-properties officeooo:rsid="000d5d42" officeooo:paragraph-rsid="000d5d42"/>
    </style:style>
    <style:style style:name="P3" style:family="paragraph" style:parent-style-name="Text_20_body">
      <style:text-properties officeooo:rsid="000d5d42" officeooo:paragraph-rsid="000d5d42"/>
    </style:style>
    <style:style style:name="P4" style:family="paragraph" style:parent-style-name="Text_20_body">
      <style:text-properties officeooo:paragraph-rsid="000d5d42"/>
    </style:style>
    <style:style style:name="P5" style:family="paragraph" style:parent-style-name="Title">
      <style:text-properties officeooo:rsid="000d5d42" officeooo:paragraph-rsid="000d5d42"/>
    </style:style>
    <style:style style:name="T1" style:family="text">
      <style:text-properties officeooo:rsid="000d5d42"/>
    </style:style>
    <style:style style:name="T2" style:family="text">
      <style:text-properties officeooo:rsid="000ef8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eguimiento Técnico: Desarrollo de Aplicación</text:p>
      <text:p text:style-name="P3"/>
      <text:h text:style-name="P1" text:outline-level="2">Día 1 (22/04/2026)</text:h>
      <text:p text:style-name="P4">- <text:span text:style-name="T1">Realizar planeamiento de la aplicación. Hecho</text:span></text:p>
      <text:p text:style-name="P4">- <text:span text:style-name="T1">Iniciar migraciones y definir entidades necesarias. Hecho</text:span></text:p>
      <text:p text:style-name="P4">- <text:span text:style-name="T1">Inicializar DbContext y servicios básicos. Hecho</text:span></text:p>
      <text:h text:style-name="P1" text:outline-level="2">Día 2 (23/04/2026)</text:h>
      <text:h text:style-name="P2" text:outline-level="3">Bloque #1</text:h>
      <text:p text:style-name="P4">- <text:span text:style-name="T1">Realizar la lógica de todos los servicios. </text:span><text:span text:style-name="T2">Hecho</text:span></text:p>
      <text:p text:style-name="P4">- <text:span text:style-name="T1">Inicializarlos en Program.cs. </text:span><text:span text:style-name="T2">Hecho</text:span></text:p>
      <text:h text:style-name="P2" text:outline-level="3">Bloque #2</text:h>
      <text:p text:style-name="P4">- <text:span text:style-name="T1">Crear esquema básico de vistas</text:span></text:p>
      <text:p text:style-name="P4">- <text:span text:style-name="T1">Conectar controladores con servicios y vistas</text:span></text:p>
      <text:h text:style-name="P2" text:outline-level="3">Bloque #3</text:h>
      <text:p text:style-name="P4">- <text:span text:style-name="T1">Realizar diseño de frontend con el apoyo de la IA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3T12:57:46.601873040</meta:creation-date>
    <dc:date>2026-04-23T21:31:48.042010411</dc:date>
    <meta:editing-duration>PT1H8M47S</meta:editing-duration>
    <meta:editing-cycles>1</meta:editing-cycles>
    <meta:document-statistic meta:table-count="0" meta:image-count="0" meta:object-count="0" meta:page-count="1" meta:paragraph-count="14" meta:word-count="77" meta:character-count="481" meta:non-whitespace-character-count="418"/>
    <meta:generator>LibreOffice/24.2.7.2$Linux_X86_64 LibreOffice_project/420$Build-2</meta:generator>
  </office:meta>
</office:document-meta>
</file>